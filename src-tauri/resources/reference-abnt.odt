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moTable" style:family="table">
      <style:table-properties style:width="6in" table:align="margins"/>
    </style:style>
    <style:style style:name="DemoTable.A" style:family="table-column">
      <style:table-column-properties style:column-width="3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</text:p>
      <text:p text:style-name="Subtitle">Subtitle</text:p>
      <text:p text:style-name="Author">Author</text:p>
      <text:p text:style-name="Date">Date</text:p>
      <text:p text:style-name="Abstract">Abstract.</text:p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6" text:outline-level="6">Heading 6</text:h>
      <text:p text:style-name="First_20_paragraph">First Paragraph.</text:p>
      <text:p text:style-name="Text_20_body">Body Text. <text:span text:style-name="Emphasis">Emphasis</text:span>. <text:span text:style-name="Strong_20_Emphasis">Strong Emphasis</text:span>. <text:span text:style-name="Strikeout">Strikeout</text:span>. <text:span text:style-name="Superscript">Superscript</text:span>. <text:span text:style-name="Subscript">Subscript</text:span>. <text:span text:style-name="Source_20_Text">Source Text</text:span>. <text:span text:style-name="Highlighted">Highlighted</text:span>. <text:a xlink:type="simple" xlink:href="https://pandoc.org"><text:span text:style-name="Definition">Hyperlink</text:span></text:a>. Footnote.<text:note text:id="ftn1" text:note-class="footnote"><text:note-citation>1</text:note-citation><text:note-body><text:p text:style-name="Footnote">Footnote text.</text:p></text:note-body></text:note></text:p>
      <text:p text:style-name="Quotations">Block quote.</text:p>
      <text:p text:style-name="Preformatted_20_Text">Preformatted Text.</text:p>
      <text:list text:style-name="List_20_1">
        <text:list-item>
          <text:p text:style-name="List_20_Bullet">Bullet list item.</text:p>
        </text:list-item>
      </text:list>
      <text:list text:style-name="Numbering_20_1">
        <text:list-item>
          <text:p text:style-name="List_20_Number">Numbered list item.</text:p>
        </text:list-item>
      </text:list>
      <text:p text:style-name="TableCaption">Table caption.</text:p>
      <table:table table:name="DemoTable" table:style-name="DemoTable">
        <table:table-column table:style-name="DemoTable.A"/>
        <table:table-column table:style-name="DemoTable.A"/>
        <table:table-header-rows>
          <table:table-row>
            <table:table-cell office:value-type="string">
              <text:p text:style-name="Table_20_Heading">Table Heading</text:p>
            </table:table-cell>
            <table:table-cell office:value-type="string">
              <text:p text:style-name="Table_20_Heading">Table Heading</text:p>
            </table:table-cell>
          </table:table-row>
        </table:table-header-rows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Table Contents</text:p>
          </table:table-cell>
        </table:table-row>
      </table:table>
      <text:p text:style-name="FigureCaption">Image caption.</text:p>
      <text:p text:style-name="Definition_20_Term">Definition Term</text:p>
      <text:p text:style-name="Definition_20_Definition">Defin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Title" style:family="paragraph" style:parent-style-name="Heading" style:next-style-name="Subtitle" style:class="chapter">
      <style:paragraph-properties fo:text-align="center" style:justify-single-word="false" fo:margin-top="0in" fo:margin-bottom="0.0835in" style:contextual-spacing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margin-top="0.0835in" fo:margin-bottom="0.0835in" style:contextual-spacing="false"/>
      <style:text-properties fo:font-size="18pt" fo:font-style="italic" style:font-size-asian="18pt" style:font-style-asian="italic" style:font-size-complex="18pt" style:font-style-complex="italic"/>
    </style: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List_20_Bullet" style:display-name="List Bullet" style:family="paragraph" style:parent-style-name="List" style:class="list"/>
    <style:style style:name="List_20_Bullet_20_Tight" style:display-name="List Bullet Tight" style:family="paragraph" style:parent-style-name="List" style:class="list">
      <style:paragraph-properties fo:margin-top="0in" fo:margin-bottom="0in" style:contextual-spacing="false"/>
    </style:style>
    <style:style style:name="List_20_Number" style:display-name="List Number" style:family="paragraph" style:parent-style-name="List" style:class="list"/>
    <style:style style:name="List_20_Number_20_Tight" style:display-name="List Number Tight" style:family="paragraph" style:parent-style-name="List" style:class="list">
      <style:paragraph-properties fo:margin-top="0in" fo:margin-bottom="0in" style:contextual-spacing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language="zxx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LOc" style:family="paragraph" style:parent-style-name="Standard">
      <style:paragraph-properties fo:text-align="center"/>
    </style:style>
    <style:style style:name="LOr" style:family="paragraph" style:parent-style-name="Standard">
      <style:paragraph-properties fo:text-align="end"/>
    </style:style>
    <style:style style:name="LOj" style:family="paragraph" style:parent-style-name="Standard">
      <style:paragraph-properties fo:text-align="justify"/>
    </style:style>
    <style:style style:name="LOfi" style:family="paragraph" style:parent-style-name="Standard">
      <style:paragraph-properties fo:text-indent="1.25cm"/>
    </style:style>
    <style:style style:name="LOjfi" style:family="paragraph" style:parent-style-name="Standard">
      <style:paragraph-properties fo:text-align="justify" fo:text-indent="1.25cm"/>
    </style:style>
    <style:style style:name="LOml" style:family="paragraph" style:parent-style-name="Standard">
      <style:paragraph-properties fo:margin-left="8cm"/>
    </style:style>
    <style:style style:name="LOb" style:family="text">
      <style:text-properties fo:font-weight="bold"/>
    </style:style>
    <style:style style:name="LOi" style:family="text">
      <style:text-properties fo:font-style="italic"/>
    </style:style>
    <style:style style:name="LObi" style:family="text">
      <style:text-properties fo:font-weight="bold" fo:font-style="italic"/>
    </style:style>
    <style:style style:name="LObreak" style:family="paragraph" style:parent-style-name="Standard">
      <style:paragraph-properties fo:break-before="pag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